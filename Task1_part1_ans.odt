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700000094B00E7983.png" manifest:media-type="image/png"/>
  <manifest:file-entry manifest:full-path="Pictures/1000000100000167000000948A6D9AB7.png" manifest:media-type="image/png"/>
  <manifest:file-entry manifest:full-path="Pictures/10000001000001670000009487D2ECCC.png" manifest:media-type="image/png"/>
  <manifest:file-entry manifest:full-path="Pictures/100000010000016700000094D3E69AFF.png" manifest:media-type="image/png"/>
  <manifest:file-entry manifest:full-path="Pictures/10000001000003DE00000129687A3AD8.png" manifest:media-type="image/png"/>
  <manifest:file-entry manifest:full-path="Pictures/10000001000003DE00000129FB38CE43.png" manifest:media-type="image/png"/>
  <manifest:file-entry manifest:full-path="Pictures/10000001000003DE00000129F4CFD8E5.png" manifest:media-type="image/png"/>
  <manifest:file-entry manifest:full-path="Pictures/10000001000003DE000001298E0A52C1.png" manifest:media-type="image/png"/>
  <manifest:file-entry manifest:full-path="Pictures/1000000100000167000000941DFAE37E.png" manifest:media-type="image/png"/>
  <manifest:file-entry manifest:full-path="Pictures/100000010000016700000094CA9F987F.png" manifest:media-type="image/png"/>
  <manifest:file-entry manifest:full-path="Pictures/10000001000003DE000001293FBCB9F8.png" manifest:media-type="image/png"/>
  <manifest:file-entry manifest:full-path="Pictures/100000010000016700000094C63B9EB1.png" manifest:media-type="image/png"/>
  <manifest:file-entry manifest:full-path="Pictures/10000001000003DE00000129D272DCD6.png" manifest:media-type="image/png"/>
  <manifest:file-entry manifest:full-path="Pictures/10000001000003DE00000129EC6E829F.png" manifest:media-type="image/png"/>
  <manifest:file-entry manifest:full-path="Pictures/10000001000003DE00000129BE6A822E.png" manifest:media-type="image/png"/>
  <manifest:file-entry manifest:full-path="Pictures/10000001000003DE00000129106187C1.png" manifest:media-type="image/png"/>
  <manifest:file-entry manifest:full-path="Pictures/10000001000003DE0000012986A508B8.png" manifest:media-type="image/png"/>
  <manifest:file-entry manifest:full-path="Pictures/10000001000003DE0000012980834A16.png" manifest:media-type="image/png"/>
  <manifest:file-entry manifest:full-path="Pictures/10000001000003DE00000129CB978460.png" manifest:media-type="image/png"/>
  <manifest:file-entry manifest:full-path="Pictures/10000001000003DE0000012998438733.png" manifest:media-type="image/png"/>
  <manifest:file-entry manifest:full-path="Pictures/10000001000003DE0000012978E58A62.png" manifest:media-type="image/png"/>
  <manifest:file-entry manifest:full-path="Pictures/10000001000003DE000001290D5BF1C0.png" manifest:media-type="image/png"/>
  <manifest:file-entry manifest:full-path="Pictures/10000001000003DE00000129322A017F.png" manifest:media-type="image/png"/>
  <manifest:file-entry manifest:full-path="Pictures/10000001000003DE00000129C94B64E4.png" manifest:media-type="image/png"/>
  <manifest:file-entry manifest:full-path="Pictures/10000001000003DE0000012962B17941.png" manifest:media-type="image/png"/>
  <manifest:file-entry manifest:full-path="Pictures/10000001000003DE000001299F117907.png" manifest:media-type="image/png"/>
  <manifest:file-entry manifest:full-path="Pictures/10000001000003DE00000129DC54C024.png" manifest:media-type="image/png"/>
  <manifest:file-entry manifest:full-path="Pictures/10000001000003DE00000129BF79CD90.png" manifest:media-type="image/png"/>
  <manifest:file-entry manifest:full-path="Pictures/1000000100000167000000947B359BB9.png" manifest:media-type="image/png"/>
  <manifest:file-entry manifest:full-path="Pictures/10000001000003DE000001292E332C10.png" manifest:media-type="image/png"/>
  <manifest:file-entry manifest:full-path="Pictures/10000001000003DE0000012922936F0F.png" manifest:media-type="image/png"/>
  <manifest:file-entry manifest:full-path="Pictures/10000001000003DE00000129C6D4F1DA.png" manifest:media-type="image/png"/>
  <manifest:file-entry manifest:full-path="Pictures/10000001000003DE00000129BC627988.png" manifest:media-type="image/png"/>
  <manifest:file-entry manifest:full-path="Pictures/10000001000003DE0000012959E70ABA.png" manifest:media-type="image/png"/>
  <manifest:file-entry manifest:full-path="Pictures/10000001000003DE00000129B9C33B96.png" manifest:media-type="image/png"/>
  <manifest:file-entry manifest:full-path="Pictures/10000001000003DE00000129CB214DD5.png" manifest:media-type="image/png"/>
  <manifest:file-entry manifest:full-path="Pictures/10000001000003DE000001298F371601.png" manifest:media-type="image/png"/>
  <manifest:file-entry manifest:full-path="Pictures/10000001000003DE00000129C34F53F0.png" manifest:media-type="image/png"/>
  <manifest:file-entry manifest:full-path="Pictures/10000001000003DE000001293C967938.png" manifest:media-type="image/png"/>
  <manifest:file-entry manifest:full-path="Pictures/10000001000003DE000001291952E748.png" manifest:media-type="image/png"/>
  <manifest:file-entry manifest:full-path="Pictures/10000001000003DE00000129FF6E1520.png" manifest:media-type="image/png"/>
  <manifest:file-entry manifest:full-path="Pictures/10000001000003DE000001294E3B3C86.png" manifest:media-type="image/png"/>
  <manifest:file-entry manifest:full-path="Pictures/10000001000003DE00000129E7578F7D.png" manifest:media-type="image/png"/>
  <manifest:file-entry manifest:full-path="Pictures/10000001000003DE0000012966C2EDBC.png" manifest:media-type="image/png"/>
  <manifest:file-entry manifest:full-path="Pictures/10000001000003DE000001291617D099.png" manifest:media-type="image/png"/>
  <manifest:file-entry manifest:full-path="Pictures/10000001000003DE00000129536D2762.png" manifest:media-type="image/png"/>
  <manifest:file-entry manifest:full-path="Pictures/10000001000003DE00000129BF5880D3.png" manifest:media-type="image/png"/>
  <manifest:file-entry manifest:full-path="Pictures/100000010000016700000094F0187698.png" manifest:media-type="image/png"/>
  <manifest:file-entry manifest:full-path="Pictures/100000010000016700000094B36D0173.png" manifest:media-type="image/png"/>
  <manifest:file-entry manifest:full-path="Pictures/10000001000003DE0000012945AAC9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DM Mono" svg:font-family="'DM Mono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4361in" style:rel-column-width="628*"/>
    </style:style>
    <style:style style:name="Table1.B" style:family="table-column">
      <style:table-column-properties style:column-width="1.6194in" style:rel-column-width="2333*"/>
    </style:style>
    <style:style style:name="Table1.C" style:family="table-column">
      <style:table-column-properties style:column-width="1.6319in" style:rel-column-width="2351*"/>
    </style:style>
    <style:style style:name="Table1.D" style:family="table-column">
      <style:table-column-properties style:column-width="2.3681in" style:rel-column-width="3411*"/>
    </style:style>
    <style:style style:name="Table1.E" style:family="table-column">
      <style:table-column-properties style:column-width="4.0632in" style:rel-column-width="5853*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 style:data-style-name="N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0.1354in"/>
    </style:style>
    <style:style style:name="Table1.B4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50" style:family="table-row">
      <style:table-row-properties style:min-row-height="0.966in"/>
    </style:style>
    <style:style style:name="Table1.B5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5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5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5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D5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51" style:family="table-cell" style:data-style-name="N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1f1f4d" officeooo:paragraph-rsid="001f1f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1f1f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117ce" officeooo:paragraph-rsid="002117c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2a09b" officeooo:paragraph-rsid="0022a0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2b2d31" loext:opacity="100%" style:text-outline="false" style:text-line-through-style="none" style:text-line-through-typ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e8937" officeooo:paragraph-rsid="001e893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line-through-style="none" style:text-line-through-type="none" style:font-name="0" fo:font-size="11pt" fo:font-style="normal" style:text-underline-style="none" fo:font-weight="normal" style:font-size-asian="11pt" style:font-style-asian="normal" style:font-weight-asian="normal"/>
    </style:style>
    <style:style style:name="T2" style:family="text">
      <style:text-properties style:font-name="0" fo:font-size="11pt" style:font-size-asian="11pt"/>
    </style:style>
    <style:style style:name="T3" style:family="text">
      <style:text-properties fo:color="#2b2d31" loext:opacity="100%" style:font-name="DM Mono" loext:padding="0in" loext:border="none"/>
    </style:style>
    <style:style style:name="T4" style:family="text">
      <style:text-properties fo:color="#2b2d31" loext:opacity="100%" loext:padding="0in" loext:border="none"/>
    </style:style>
    <style:style style:name="T5" style:family="text">
      <style:text-properties fo:font-variant="normal" fo:text-transform="none" fo:color="#2b2d31" loext:opacity="100%" style:font-name="Inter" fo:font-size="10.5pt" fo:letter-spacing="normal"/>
    </style:style>
    <style:style style:name="T6" style:family="text">
      <style:text-properties fo:font-variant="normal" fo:text-transform="none" fo:color="#2b2d31" loext:opacity="100%" style:font-name="Inter" fo:font-size="10.5pt" fo:letter-spacing="normal" fo:font-weight="normal"/>
    </style:style>
    <style:style style:name="T7" style:family="text">
      <style:text-properties fo:font-variant="normal" fo:text-transform="none" fo:color="#2b2d31" loext:opacity="100%" style:font-name="DM Mono" fo:font-size="10.5pt" fo:letter-spacing="normal" loext:padding="0in" loext:border="none"/>
    </style:style>
    <style:style style:name="T8" style:family="text">
      <style:text-properties fo:font-variant="normal" fo:text-transform="none" fo:color="#2b2d31" loext:opacity="100%" fo:letter-spacing="normal"/>
    </style:style>
    <style:style style:name="T9" style:family="text">
      <style:text-properties fo:font-variant="normal" fo:text-transform="none" fo:color="#2b2d31" loext:opacity="100%" fo:letter-spacing="normal" loext:padding="0in" loext:border="none"/>
    </style:style>
    <style:style style:name="T10" style:family="text">
      <style:text-properties fo:font-variant="normal" fo:text-transform="none" fo:color="#2b2d31" loext:opacity="100%" fo:font-size="10.5pt" fo:letter-spacing="normal"/>
    </style:style>
    <style:style style:name="T11" style:family="text">
      <style:text-properties fo:font-variant="normal" fo:text-transform="none" fo:color="#2b2d31" loext:opacity="100%" fo:font-size="10.5pt" fo:letter-spacing="normal" loext:padding="0in" loext:border="none"/>
    </style:style>
    <style:style style:name="T12" style:family="text">
      <style:text-properties fo:font-variant="normal" fo:text-transform="none" fo:color="#2b2d31" loext:opacity="100%" fo:font-size="10.5pt" fo:letter-spacing="normal" fo:font-weight="normal"/>
    </style:style>
    <style:style style:name="T13" style:family="text">
      <style:text-properties fo:font-variant="normal" fo:text-transform="none" fo:color="#2b2d31" loext:opacity="100%" style:font-name="Times new roman" fo:font-size="10.5pt" fo:letter-spacing="normal"/>
    </style:style>
    <style:style style:name="T14" style:family="text">
      <style:text-properties fo:font-variant="normal" fo:text-transform="none" fo:color="#2b2d31" loext:opacity="100%" style:font-name="Times new roman" fo:font-size="10.5pt" fo:letter-spacing="normal" fo:font-weight="normal"/>
    </style:style>
    <style:style style:name="T15" style:family="text">
      <style:text-properties fo:font-variant="normal" fo:text-transform="none" fo:color="#2b2d31" loext:opacity="100%" style:font-name="Times new roman" fo:font-size="10.5pt" fo:letter-spacing="normal" loext:padding="0in" loext:border="none"/>
    </style:style>
    <style:style style:name="T16" style:family="text">
      <style:text-properties fo:font-variant="normal" fo:text-transform="none" fo:color="#2b2d31" loext:opacity="100%" style:font-name="Times new roman" fo:font-size="10.5pt" fo:letter-spacing="normal" fo:font-style="italic" style:font-style-asian="italic" style:font-style-complex="italic"/>
    </style:style>
    <style:style style:name="T17" style:family="text">
      <style:text-properties fo:font-variant="normal" fo:text-transform="none" fo:color="#2b2d31" loext:opacity="100%" style:font-name="Times new roman" fo:font-size="10.5pt" fo:letter-spacing="normal" fo:font-style="italic" style:font-style-asian="italic" style:font-style-complex="italic" loext:padding="0in" loext:border="none"/>
    </style:style>
    <style:style style:name="T18" style:family="text">
      <style:text-properties fo:font-variant="normal" fo:text-transform="none" fo:color="#2b2d31" loext:opacity="100%" style:font-name="Times new roman" fo:font-size="10.5pt" fo:letter-spacing="normal" fo:font-style="italic" fo:font-weight="normal" style:font-style-asian="italic" style:font-style-complex="italic"/>
    </style:style>
    <style:style style:name="T19" style:family="text">
      <style:text-properties fo:font-variant="normal" fo:text-transform="none" fo:color="#2b2d31" loext:opacity="100%" style:font-name="Times new roman" fo:letter-spacing="normal"/>
    </style:style>
    <style:style style:name="T20" style:family="text">
      <style:text-properties fo:font-variant="normal" fo:text-transform="none" fo:color="#2b2d31" loext:opacity="100%" style:font-name="Times new roman" fo:letter-spacing="normal" fo:font-style="italic" style:font-style-asian="italic" style:font-style-complex="italic"/>
    </style:style>
    <style:style style:name="T21" style:family="text">
      <style:text-properties fo:font-variant="normal" fo:text-transform="none" fo:color="#2b2d31" loext:opacity="100%" style:font-name="Times new roman" fo:letter-spacing="normal" fo:font-weight="normal"/>
    </style:style>
    <style:style style:name="T22" style:family="text">
      <style:text-properties fo:font-variant="normal" fo:text-transform="none" fo:color="#2b2d31" loext:opacity="100%" style:font-name="Times new roman" fo:letter-spacing="normal" loext:padding="0in" loext:border="none"/>
    </style:style>
    <style:style style:name="T23" style:family="text">
      <style:text-properties fo:font-variant="normal" fo:text-transform="none" fo:color="#2b2d31" loext:opacity="100%" style:font-name="Times new roman" fo:font-size="11pt" fo:letter-spacing="normal" style:font-size-asian="11pt" style:font-size-complex="11pt"/>
    </style:style>
    <style:style style:name="T24" style:family="text">
      <style:text-properties fo:font-variant="normal" fo:text-transform="none" fo:color="#2b2d31" loext:opacity="100%" style:font-name="Times new roman" fo:font-size="11pt" fo:letter-spacing="normal" style:font-size-asian="11pt" style:font-size-complex="11pt" loext:padding="0in" loext:border="none"/>
    </style:style>
    <style:style style:name="T25" style:family="text">
      <style:text-properties fo:font-variant="normal" fo:text-transform="none" fo:color="#2b2d31" loext:opacity="100%" style:font-name="Times new roman" fo:font-size="11pt" fo:letter-spacing="normal" fo:font-weight="normal" style:font-size-asian="11pt" style:font-size-complex="11pt"/>
    </style:style>
    <style:style style:name="T26" style:family="text">
      <style:text-properties fo:font-size="11pt" style:font-size-asian="11pt"/>
    </style:style>
    <style:style style:name="T27" style:family="text">
      <style:text-properties officeooo:rsid="0028d80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9">S.N.</text:p>
            </table:table-cell>
            <table:table-cell table:style-name="Table1.A1" office:value-type="string">
              <text:p text:style-name="P9">Natural Language Question</text:p>
            </table:table-cell>
            <table:table-cell table:style-name="Table1.A1" office:value-type="string">
              <text:p text:style-name="P9">SQL Query</text:p>
            </table:table-cell>
            <table:table-cell table:style-name="Table1.A1" office:value-type="string">
              <text:p text:style-name="P9">Explanation</text:p>
            </table:table-cell>
            <table:table-cell table:style-name="Table1.A1" office:value-type="string">
              <text:p text:style-name="P9">Snippet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1">List all products</text:p>
          </table:table-cell>
          <table:table-cell table:style-name="Table1.C2" office:value-type="string">
            <text:p text:style-name="P4">SELECT * FROM products;</text:p>
          </table:table-cell>
          <table:table-cell table:style-name="Table1.D2" office:value-type="string">
            <text:p text:style-name="P4"><text:span text:style-name="T8">Retrieves every column and record from the </text:span><text:span text:style-name="T9">products</text:span><text:span text:style-name="T8"> table to provide a full inventory list.</text:span></text:p>
          </table:table-cell>
          <table:table-cell table:style-name="Table1.E2">
            <text:p text:style-name="P4"><draw:frame draw:style-name="fr2" draw:name="Image1" text:anchor-type="char" svg:width="3.8055in" svg:height="1.1417in" draw:z-index="0"><draw:image xlink:href="Pictures/10000001000003DE0000012922936F0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3" office:value-type="string">
            <text:p text:style-name="P4">Get all customers</text:p>
          </table:table-cell>
          <table:table-cell table:style-name="Table1.C3" office:value-type="string">
            <text:p text:style-name="P5"><text:span text:style-name="T4">SELECT * FROM customers;</text:span></text:p>
          </table:table-cell>
          <table:table-cell table:style-name="Table1.D3" office:value-type="string">
            <text:p text:style-name="P4"><text:span text:style-name="T8">Selects all data points for every customer registered in the </text:span><text:span text:style-name="T9">customers</text:span><text:span text:style-name="T8"> table.</text:span></text:p>
          </table:table-cell>
          <table:table-cell table:style-name="Table1.E2">
            <text:p text:style-name="P4"><draw:frame draw:style-name="fr2" draw:name="Image2" text:anchor-type="char" svg:width="3.8055in" svg:height="1.1417in" draw:z-index="1"><draw:image xlink:href="Pictures/10000001000003DE00000129EC6E829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4" office:value-type="string">
            <text:p text:style-name="P1">Show all orders</text:p>
          </table:table-cell>
          <table:table-cell table:style-name="Table1.C4" office:value-type="string">
            <text:p text:style-name="P6">SELECT * FROM orders;</text:p>
          </table:table-cell>
          <table:table-cell table:style-name="Table1.D4" office:value-type="string">
            <text:p text:style-name="P4"><text:span text:style-name="T8">Fetches all records from the </text:span><text:span text:style-name="T9">orders</text:span><text:span text:style-name="T8"> table, showing order IDs, dates, and statuses.</text:span></text:p>
          </table:table-cell>
          <table:table-cell table:style-name="Table1.E2">
            <text:p text:style-name="P4"><draw:frame draw:style-name="fr2" draw:name="Image3" text:anchor-type="char" svg:width="3.8083in" svg:height="1.1425in" draw:z-index="2"><draw:image xlink:href="Pictures/10000001000003DE000001299F117907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B5" office:value-type="string">
            <text:p text:style-name="P1">List all employees</text:p>
          </table:table-cell>
          <table:table-cell table:style-name="Table1.C5" office:value-type="string">
            <text:p text:style-name="P8">SELECT * FROM employees;</text:p>
          </table:table-cell>
          <table:table-cell table:style-name="Table1.D5" office:value-type="string">
            <text:p text:style-name="P4"><text:span text:style-name="T8">Retrieves the full profile for every staff member from the </text:span><text:span text:style-name="T9">employees</text:span><text:span text:style-name="T8"> table.</text:span></text:p>
          </table:table-cell>
          <table:table-cell table:style-name="Table1.E2">
            <text:p text:style-name="P4"><draw:frame draw:style-name="fr2" draw:name="Image4" text:anchor-type="char" svg:width="3.8083in" svg:height="1.1425in" draw:z-index="3"><draw:image xlink:href="Pictures/10000001000003DE00000129B9C33B96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6">5</text:p>
          </table:table-cell>
          <table:table-cell table:style-name="Table1.B6" office:value-type="string">
            <text:p text:style-name="P1">Get all offices</text:p>
          </table:table-cell>
          <table:table-cell table:style-name="Table1.C6" office:value-type="string">
            <text:p text:style-name="P8">SELECT * FROM offices;</text:p>
          </table:table-cell>
          <table:table-cell table:style-name="Table1.D6" office:value-type="string">
            <text:p text:style-name="P4"><text:span text:style-name="T8">Selects all information regarding physical office locations from the </text:span><text:span text:style-name="T9">offices</text:span><text:span text:style-name="T8"> table.</text:span></text:p>
          </table:table-cell>
          <table:table-cell table:style-name="Table1.E2">
            <text:p text:style-name="P4"><draw:frame draw:style-name="fr1" draw:name="Image5" text:anchor-type="char" svg:width="4.0634in" svg:height="1.2189in" draw:z-index="4"><draw:image xlink:href="Pictures/10000001000003DE00000129BF79CD9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B7" office:value-type="string">
            <text:p text:style-name="P1">Show all product lines</text:p>
          </table:table-cell>
          <table:table-cell table:style-name="Table1.C7" office:value-type="string">
            <text:p text:style-name="P7">SELECT * FROM productlines;</text:p>
          </table:table-cell>
          <table:table-cell table:style-name="Table1.D7" office:value-type="string">
            <text:p text:style-name="P4"><text:span text:style-name="T8">Returns the categories and descriptions available in the </text:span><text:span text:style-name="T9">productlines</text:span><text:span text:style-name="T8"> table.</text:span></text:p>
          </table:table-cell>
          <table:table-cell table:style-name="Table1.E2">
            <text:p text:style-name="P4"><draw:frame draw:style-name="fr1" draw:name="Image6" text:anchor-type="char" svg:width="4.0634in" svg:height="1.2189in" draw:z-index="5"><draw:image xlink:href="Pictures/10000001000003DE0000012962B1794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B8" office:value-type="string">
            <text:p text:style-name="P1">List all payments</text:p>
          </table:table-cell>
          <table:table-cell table:style-name="Table1.C8" office:value-type="string">
            <text:p text:style-name="P8">SELECT * FROM payments;</text:p>
          </table:table-cell>
          <table:table-cell table:style-name="Table1.D8" office:value-type="string">
            <text:p text:style-name="P4"><text:span text:style-name="T8">Provides a complete history of all financial transactions recorded in the </text:span><text:span text:style-name="T9">payments</text:span><text:span text:style-name="T8"> table.</text:span></text:p>
          </table:table-cell>
          <table:table-cell table:style-name="Table1.E2">
            <text:p text:style-name="P4"><draw:frame draw:style-name="fr1" draw:name="Image7" text:anchor-type="char" svg:width="4.0634in" svg:height="1.2189in" draw:z-index="6"><draw:image xlink:href="Pictures/10000001000003DE00000129322A017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B9" office:value-type="string">
            <text:p text:style-name="P1">Get product names and prices</text:p>
          </table:table-cell>
          <table:table-cell table:style-name="Table1.C9" office:value-type="string">
            <text:p text:style-name="P4">SELECT "productName", "buyPrice" FROM products;</text:p>
          </table:table-cell>
          <table:table-cell table:style-name="Table1.D9" office:value-type="string">
            <text:p text:style-name="P4"><text:span text:style-name="T8">Projects specific columns (</text:span><text:span text:style-name="T9">productName</text:span><text:span text:style-name="T8">, </text:span><text:span text:style-name="T9">buyPrice</text:span><text:span text:style-name="T8">) from the </text:span><text:span text:style-name="T9">products</text:span><text:span text:style-name="T8"> table for a price list.</text:span></text:p>
          </table:table-cell>
          <table:table-cell table:style-name="Table1.E2">
            <text:p text:style-name="P4"><draw:frame draw:style-name="fr1" draw:name="Image8" text:anchor-type="char" svg:width="4.0634in" svg:height="1.2189in" draw:z-index="7"><draw:image xlink:href="Pictures/10000001000003DE000001290D5BF1C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B10" office:value-type="string">
            <text:p text:style-name="P1">Get customer names and cities</text:p>
          </table:table-cell>
          <table:table-cell table:style-name="Table1.C10" office:value-type="string">
            <text:p text:style-name="P4">SELECT "customerName", "city" FROM customers;</text:p>
          </table:table-cell>
          <table:table-cell table:style-name="Table1.D10" office:value-type="string">
            <text:p text:style-name="P4"><text:span text:style-name="T8">Retrieves the company name and their physical city location from the </text:span><text:span text:style-name="T9">customers</text:span><text:span text:style-name="T8"> table.</text:span></text:p>
          </table:table-cell>
          <table:table-cell table:style-name="Table1.E2">
            <text:p text:style-name="P4"><draw:frame draw:style-name="fr1" draw:name="Image9" text:anchor-type="char" svg:width="4.0634in" svg:height="1.2189in" draw:z-index="8"><draw:image xlink:href="Pictures/10000001000003DE0000012980834A16.png" xlink:type="simple" xlink:show="embed" xlink:actuate="onLoad" draw:mime-type="image/png"/></draw:frame><text:soft-page-break/>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B11" office:value-type="string">
            <text:p text:style-name="P1">List employee first and last names</text:p>
          </table:table-cell>
          <table:table-cell table:style-name="Table1.C11" office:value-type="string">
            <text:p text:style-name="P4">SELECT "firstName", "lastName" FROM employees;</text:p>
          </table:table-cell>
          <table:table-cell table:style-name="Table1.D11" office:value-type="string">
            <text:p text:style-name="P4"><text:span text:style-name="T8">Selects only the name components of staff to create a simple directory from the </text:span><text:span text:style-name="T9">employees</text:span><text:span text:style-name="T8"> table.</text:span></text:p>
          </table:table-cell>
          <table:table-cell table:style-name="Table1.E2">
            <text:p text:style-name="P4"><draw:frame draw:style-name="fr1" draw:name="Image10" text:anchor-type="char" svg:width="4.0634in" svg:height="1.2189in" draw:z-index="9"><draw:image xlink:href="Pictures/10000001000003DE00000129C94B64E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12" office:value-type="string">
            <text:p text:style-name="P1">Get all order dates</text:p>
          </table:table-cell>
          <table:table-cell table:style-name="Table1.C12" office:value-type="string">
            <text:p text:style-name="P8">SELECT “orderDate” FROM orders;</text:p>
          </table:table-cell>
          <table:table-cell table:style-name="Table1.D12" office:value-type="string">
            <text:p text:style-name="P4"><text:span text:style-name="T8">Fetches the </text:span><text:span text:style-name="T9">orderDate</text:span><text:span text:style-name="T8"> column from the </text:span><text:span text:style-name="T9">orders</text:span><text:span text:style-name="T8"> table to analyze chronological activity.</text:span></text:p>
          </table:table-cell>
          <table:table-cell table:style-name="Table1.E2">
            <text:p text:style-name="P4"><draw:frame draw:style-name="fr1" draw:name="Image11" text:anchor-type="char" svg:width="4.0634in" svg:height="1.2189in" draw:z-index="10"><draw:image xlink:href="Pictures/10000001000003DE000001292E332C1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B13" office:value-type="string">
            <text:p text:style-name="P1">Show product vendor list</text:p>
          </table:table-cell>
          <table:table-cell table:style-name="Table1.C13" office:value-type="string">
            <text:p text:style-name="P4">SELECT DISTINCT "productVendor" FROM products;</text:p>
          </table:table-cell>
          <table:table-cell table:style-name="Table1.D13" office:value-type="string">
            <text:p text:style-name="P4"><text:span text:style-name="T8">Uses the </text:span><text:span text:style-name="T9">DISTINCT</text:span><text:span text:style-name="T8"> keyword on the </text:span><text:span text:style-name="T9">productVendor</text:span><text:span text:style-name="T8"> column to list unique suppliers without duplicates.</text:span></text:p>
          </table:table-cell>
          <table:table-cell table:style-name="Table1.E2">
            <text:p text:style-name="P4"><draw:frame draw:style-name="fr1" draw:name="Image12" text:anchor-type="char" svg:width="4.0634in" svg:height="1.2189in" draw:z-index="11"><draw:image xlink:href="Pictures/10000001000003DE0000012986A508B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B14" office:value-type="string">
            <text:p text:style-name="P1">Get all product codes</text:p>
          </table:table-cell>
          <table:table-cell table:style-name="Table1.C14" office:value-type="string">
            <text:p text:style-name="P4">SELECT "productCode" FROM products;</text:p>
          </table:table-cell>
          <table:table-cell table:style-name="Table1.D14" office:value-type="string">
            <text:p text:style-name="P4"><text:span text:style-name="T8">Selects the primary key (</text:span><text:span text:style-name="T9">productCode</text:span><text:span text:style-name="T8">) for all items in the </text:span><text:span text:style-name="T9">products</text:span><text:span text:style-name="T8"> table.</text:span></text:p>
          </table:table-cell>
          <table:table-cell table:style-name="Table1.E2">
            <text:p text:style-name="P4"><draw:frame draw:style-name="fr1" draw:name="Image13" text:anchor-type="char" svg:width="4.0634in" svg:height="1.2189in" draw:z-index="12"><draw:image xlink:href="Pictures/10000001000003DE00000129D272DCD6.png" xlink:type="simple" xlink:show="embed" xlink:actuate="onLoad" draw:mime-type="image/png"/></draw:frame><text:soft-page-break/></text:p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B15" office:value-type="string">
            <text:p text:style-name="P1">List all countries from offices</text:p>
          </table:table-cell>
          <table:table-cell table:style-name="Table1.C15" office:value-type="string">
            <text:p text:style-name="P4">SELECT DISTINCT country FROM offices;</text:p>
          </table:table-cell>
          <table:table-cell table:style-name="Table1.D15" office:value-type="string">
            <text:p text:style-name="P4"><text:span text:style-name="T8">Uses </text:span><text:span text:style-name="T9">DISTINCT</text:span><text:span text:style-name="T8"> on the </text:span><text:span text:style-name="T9">country</text:span><text:span text:style-name="T8"> column in the </text:span><text:span text:style-name="T9">offices</text:span><text:span text:style-name="T8"> table to see where the company has a physical presence.</text:span></text:p>
          </table:table-cell>
          <table:table-cell table:style-name="Table1.E2">
            <text:p text:style-name="P4"><draw:frame draw:style-name="fr1" draw:name="Image14" text:anchor-type="char" svg:width="4.0634in" svg:height="1.2189in" draw:z-index="13"><draw:image xlink:href="Pictures/10000001000003DE00000129C34F53F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B16" office:value-type="string">
            <text:p text:style-name="P1">Show all order statuses</text:p>
          </table:table-cell>
          <table:table-cell table:style-name="Table1.C16" office:value-type="string">
            <text:p text:style-name="P8">SELECT DISTINCT status FROM orders;</text:p>
          </table:table-cell>
          <table:table-cell table:style-name="Table1.D16" office:value-type="string">
            <text:p text:style-name="P4"><text:span text:style-name="T8">Returns unique values (like 'Shipped', 'Pending') from the </text:span><text:span text:style-name="T9">status</text:span><text:span text:style-name="T8"> column in the </text:span><text:span text:style-name="T9">orders</text:span><text:span text:style-name="T8"> table.</text:span></text:p>
          </table:table-cell>
          <table:table-cell table:style-name="Table1.E2">
            <text:p text:style-name="P4"><draw:frame draw:style-name="fr1" draw:name="Image15" text:anchor-type="char" svg:width="4.0634in" svg:height="1.2189in" draw:z-index="14"><draw:image xlink:href="Pictures/10000001000003DE00000129BC62798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B17" office:value-type="string">
            <text:p text:style-name="P1">Get all payment amounts</text:p>
          </table:table-cell>
          <table:table-cell table:style-name="Table1.C17" office:value-type="string">
            <text:p text:style-name="P4">SELECT amount FROM payments;</text:p>
          </table:table-cell>
          <table:table-cell table:style-name="Table1.D17" office:value-type="string">
            <text:p text:style-name="P4"><text:span text:style-name="T8">Extracts the numerical value of every transaction from the </text:span><text:span text:style-name="T9">payments</text:span><text:span text:style-name="T8"> table.</text:span></text:p>
          </table:table-cell>
          <table:table-cell table:style-name="Table1.E2">
            <text:p text:style-name="P4"><draw:frame draw:style-name="fr1" draw:name="Image16" text:anchor-type="char" svg:width="4.0634in" svg:height="1.2189in" draw:z-index="15"><draw:image xlink:href="Pictures/10000001000003DE0000012959E70AB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17</text:p>
          </table:table-cell>
          <table:table-cell table:style-name="Table1.B18" office:value-type="string">
            <text:p text:style-name="P1">List all job titles</text:p>
          </table:table-cell>
          <table:table-cell table:style-name="Table1.C18" office:value-type="string">
            <text:p text:style-name="P4">SELECT DISTINCT "jobTitle" FROM employees;</text:p>
          </table:table-cell>
          <table:table-cell table:style-name="Table1.D18" office:value-type="string">
            <text:p text:style-name="P4"><text:span text:style-name="T8">Provides a unique list of all professional roles held by staff using </text:span><text:span text:style-name="T9">DISTINCT</text:span><text:span text:style-name="T8"> on </text:span><text:span text:style-name="T9">jobTitle</text:span><text:span text:style-name="T8">.</text:span></text:p>
          </table:table-cell>
          <table:table-cell table:style-name="Table1.E2">
            <text:p text:style-name="P4"><draw:frame draw:style-name="fr1" draw:name="Image17" text:anchor-type="char" svg:width="4.0634in" svg:height="1.2189in" draw:z-index="16"><draw:image xlink:href="Pictures/10000001000003DE00000129106187C1.png" xlink:type="simple" xlink:show="embed" xlink:actuate="onLoad" draw:mime-type="image/png"/></draw:frame><text:soft-page-break/></text:p>
          </table:table-cell>
        </table:table-row>
        <table:table-row>
          <table:table-cell table:style-name="Table1.A2" office:value-type="string">
            <text:p text:style-name="P6">18</text:p>
          </table:table-cell>
          <table:table-cell table:style-name="Table1.B19" office:value-type="string">
            <text:p text:style-name="P1">Get customer phone numbers</text:p>
          </table:table-cell>
          <table:table-cell table:style-name="Table1.C19" office:value-type="string">
            <text:p text:style-name="P4">SELECT "customerName", phone FROM customers;</text:p>
          </table:table-cell>
          <table:table-cell table:style-name="Table1.D19" office:value-type="string">
            <text:p text:style-name="P4"><text:span text:style-name="T8">Selects contact names and their corresponding phone numbers from the </text:span><text:span text:style-name="T9">customers</text:span><text:span text:style-name="T8"> table.</text:span></text:p>
          </table:table-cell>
          <table:table-cell table:style-name="Table1.E2">
            <text:p text:style-name="P4"><draw:frame draw:style-name="fr1" draw:name="Image18" text:anchor-type="char" svg:width="4.0634in" svg:height="1.2189in" draw:z-index="17"><draw:image xlink:href="Pictures/10000001000003DE000001299843873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19</text:p>
          </table:table-cell>
          <table:table-cell table:style-name="Table1.B20" office:value-type="string">
            <text:p text:style-name="P1">Show product MSRP values</text:p>
          </table:table-cell>
          <table:table-cell table:style-name="Table1.C20" office:value-type="string">
            <text:p text:style-name="P4">SELECT "productName", "MSRP" FROM products;</text:p>
          </table:table-cell>
          <table:table-cell table:style-name="Table1.D20" office:value-type="string">
            <text:p text:style-name="P8">Retrieves the name and Manufacturer's Suggested Retail Price for all inventory items.</text:p>
          </table:table-cell>
          <table:table-cell table:style-name="Table1.E2">
            <text:p text:style-name="P4"><draw:frame draw:style-name="fr1" draw:name="Image19" text:anchor-type="char" svg:width="4.0634in" svg:height="1.2189in" draw:z-index="18"><draw:image xlink:href="Pictures/10000001000003DE0000012978E58A62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20</text:p>
          </table:table-cell>
          <table:table-cell table:style-name="Table1.B21" office:value-type="string">
            <text:p text:style-name="P1">List order numbers</text:p>
          </table:table-cell>
          <table:table-cell table:style-name="Table1.C21" office:value-type="string">
            <text:p text:style-name="P8">SELECT “orderNumber” FROM orders;</text:p>
          </table:table-cell>
          <table:table-cell table:style-name="Table1.D21" office:value-type="string">
            <text:p text:style-name="P8">Fetches the unique identification numbers for every order placed.</text:p>
          </table:table-cell>
          <table:table-cell table:style-name="Table1.E2">
            <text:p text:style-name="P4"><draw:frame draw:style-name="fr1" draw:name="Image20" text:anchor-type="char" svg:width="4.0634in" svg:height="1.2189in" draw:z-index="19"><draw:image xlink:href="Pictures/10000001000003DE00000129CB214DD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6">21</text:p>
          </table:table-cell>
          <table:table-cell table:style-name="Table1.B22" office:value-type="string">
            <text:p text:style-name="P1">Get orders with customer names</text:p>
          </table:table-cell>
          <table:table-cell table:style-name="Table1.C22" office:value-type="string">
            <text:p text:style-name="P8">SELECT o."orderNumber", c."customerName" FROM orders o JOIN customers c ON o."customerNumber" = c."customerNumber";</text:p>
          </table:table-cell>
          <table:table-cell table:style-name="Table1.D22" office:value-type="string">
            <text:p text:style-name="P4"><text:span text:style-name="T8">Performs an </text:span><text:span text:style-name="T9">INNER JOIN</text:span><text:span text:style-name="T8"> between </text:span><text:span text:style-name="T9">orders</text:span><text:span text:style-name="T8"> and </text:span><text:span text:style-name="T9">customers</text:span><text:span text:style-name="T8"> using </text:span><text:span text:style-name="T9">customerNumber</text:span><text:span text:style-name="T8"> to link orders to specific clients.</text:span></text:p>
          </table:table-cell>
          <table:table-cell table:style-name="Table1.E2">
            <text:p text:style-name="P4"><draw:frame draw:style-name="fr1" draw:name="Image21" text:anchor-type="char" svg:width="4.0634in" svg:height="1.2189in" draw:z-index="20"><draw:image xlink:href="Pictures/10000001000003DE000001298F37160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22</text:p>
          </table:table-cell>
          <table:table-cell table:style-name="Table1.B23" office:value-type="string">
            <text:p text:style-name="P1">Get employees with office city</text:p>
          </table:table-cell>
          <table:table-cell table:style-name="Table1.C23" office:value-type="string">
            <text:p text:style-name="P4">SELECT e."firstName", e."lastName", o.city FROM employees e JOIN offices o ON e."officeCode" = o."officeCode";</text:p>
          </table:table-cell>
          <table:table-cell table:style-name="Table1.D23" office:value-type="string">
            <text:p text:style-name="P4"><text:span text:style-name="T8">Joins the </text:span><text:span text:style-name="T9">employees</text:span><text:span text:style-name="T8"> table with the </text:span><text:span text:style-name="T9">offices</text:span><text:span text:style-name="T8"> table on </text:span><text:span text:style-name="T9">officeCode</text:span><text:span text:style-name="T8"> to show where each employee is based.</text:span></text:p>
          </table:table-cell>
          <table:table-cell table:style-name="Table1.E2">
            <text:p text:style-name="P4"><draw:frame draw:style-name="fr1" draw:name="Image22" text:anchor-type="char" svg:width="4.0634in" svg:height="1.2189in" draw:z-index="21"><draw:image xlink:href="Pictures/10000001000003DE000001293C96793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23</text:p>
          </table:table-cell>
          <table:table-cell table:style-name="Table1.B24" office:value-type="string">
            <text:p text:style-name="P1">Get payments with customer names</text:p>
          </table:table-cell>
          <table:table-cell table:style-name="Table1.C24" office:value-type="string">
            <text:p text:style-name="P4">SELECT p."checkNumber", c."customerName" FROM payments p JOIN customers c ON p."customerNumber" = c."customerNumber";</text:p>
          </table:table-cell>
          <table:table-cell table:style-name="Table1.D24" office:value-type="string">
            <text:p text:style-name="P4"><text:span text:style-name="T8">Links the </text:span><text:span text:style-name="T9">payments</text:span><text:span text:style-name="T8"> table to </text:span><text:span text:style-name="T9">customers</text:span><text:span text:style-name="T8"> to identify which client made each specific payment.</text:span></text:p>
          </table:table-cell>
          <table:table-cell table:style-name="Table1.E2">
            <text:p text:style-name="P4"><draw:frame draw:style-name="fr1" draw:name="Image23" text:anchor-type="char" svg:width="4.0634in" svg:height="1.2189in" draw:z-index="22"><draw:image xlink:href="Pictures/10000001000003DE00000129FF6E152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24</text:p>
          </table:table-cell>
          <table:table-cell table:style-name="Table1.B25" office:value-type="string">
            <text:p text:style-name="P1">Get order details with product names</text:p>
          </table:table-cell>
          <table:table-cell table:style-name="Table1.C25" office:value-type="string">
            <text:p text:style-name="P4">SELECT od.*, p."productName" FROM orderdetails od JOIN products p ON od."productCode" = p."productCode";</text:p>
          </table:table-cell>
          <table:table-cell table:style-name="Table1.D25" office:value-type="string">
            <text:p text:style-name="P4"><text:span text:style-name="T8">Joins </text:span><text:span text:style-name="T9">orderdetails</text:span><text:span text:style-name="T8"> and </text:span><text:span text:style-name="T9">products</text:span><text:span text:style-name="T8"> on </text:span><text:span text:style-name="T9">productCode</text:span><text:span text:style-name="T8"> to show the actual name of items within specific orders.</text:span></text:p>
          </table:table-cell>
          <table:table-cell table:style-name="Table1.E2">
            <text:p text:style-name="P4"><draw:frame draw:style-name="fr1" draw:name="Image24" text:anchor-type="char" svg:width="4.0634in" svg:height="1.2189in" draw:z-index="23"><draw:image xlink:href="Pictures/10000001000003DE00000129536D2762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6">25</text:p>
          </table:table-cell>
          <table:table-cell table:style-name="Table1.B26" office:value-type="string">
            <text:p text:style-name="P1">Get products with product line description</text:p>
          </table:table-cell>
          <table:table-cell table:style-name="Table1.C26" office:value-type="string">
            <text:p text:style-name="P4">SELECT p."productName", pl."textDescription" FROM products p JOIN "productlines" pl ON p."productLine" = pl."productLine";</text:p>
          </table:table-cell>
          <table:table-cell table:style-name="Table1.D26" office:value-type="string">
            <text:p text:style-name="P4"><text:span text:style-name="T8">Joins </text:span><text:span text:style-name="T9">products</text:span><text:span text:style-name="T8"> with </text:span><text:span text:style-name="T9">productlines</text:span><text:span text:style-name="T8"> to provide the full text description of each product's category.</text:span></text:p>
          </table:table-cell>
          <table:table-cell table:style-name="Table1.E2">
            <text:p text:style-name="P4"><draw:frame draw:style-name="fr1" draw:name="Image25" text:anchor-type="char" svg:width="4.0634in" svg:height="1.2189in" draw:z-index="24"><draw:image xlink:href="Pictures/10000001000003DE00000129DC54C02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26</text:p>
          </table:table-cell>
          <table:table-cell table:style-name="Table1.B27" office:value-type="string">
            <text:p text:style-name="P1">Get customers with sales rep names</text:p>
          </table:table-cell>
          <table:table-cell table:style-name="Table1.C27" office:value-type="string">
            <text:p text:style-name="P4">SELECT c."customerName", e."firstName", e."lastName" FROM customers c JOIN employees e ON c."salesRepEmployeeNumber" = e."employeeNumber";</text:p>
          </table:table-cell>
          <table:table-cell table:style-name="Table1.D27" office:value-type="string">
            <text:p text:style-name="P4"><text:span text:style-name="T8">Links </text:span><text:span text:style-name="T9">customers</text:span><text:span text:style-name="T8"> to the </text:span><text:span text:style-name="T9">employees</text:span><text:span text:style-name="T8"> table to identify the specific sales representative assigned to each account.</text:span></text:p>
          </table:table-cell>
          <table:table-cell table:style-name="Table1.E2">
            <text:p text:style-name="P4"><draw:frame draw:style-name="fr1" draw:name="Image26" text:anchor-type="char" svg:width="4.0634in" svg:height="1.2189in" draw:z-index="25"><draw:image xlink:href="Pictures/10000001000003DE000001294E3B3C86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27</text:p>
          </table:table-cell>
          <table:table-cell table:style-name="Table1.B28" office:value-type="string">
            <text:p text:style-name="P1">Get orders with customer city</text:p>
          </table:table-cell>
          <table:table-cell table:style-name="Table1.C28" office:value-type="string">
            <text:p text:style-name="P4">SELECT o."orderNumber", c.city FROM orders o JOIN customers c ON o."customerNumber" = c."customerNumber";</text:p>
          </table:table-cell>
          <table:table-cell table:style-name="Table1.D28" office:value-type="string">
            <text:p text:style-name="P8">Uses a join to retrieve the city where the customer is located for every order in the database.</text:p>
          </table:table-cell>
          <table:table-cell table:style-name="Table1.E2">
            <text:p text:style-name="P4"><draw:frame draw:style-name="fr1" draw:name="Image27" text:anchor-type="char" svg:width="4.0634in" svg:height="1.2189in" draw:z-index="26"><draw:image xlink:href="Pictures/10000001000003DE00000129BF5880D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28</text:p>
          </table:table-cell>
          <table:table-cell table:style-name="Table1.B29" office:value-type="string">
            <text:p text:style-name="P1">Get employees and their manager</text:p>
          </table:table-cell>
          <table:table-cell table:style-name="Table1.C29" office:value-type="string">
            <text:p text:style-name="P4">SELECT e."firstName" AS Employee, m."firstName" AS Manager FROM employees e LEFT JOIN employees m ON e."reportsTo" = m."employeeNumber";</text:p>
          </table:table-cell>
          <table:table-cell table:style-name="Table1.D29" office:value-type="string">
            <text:p text:style-name="P2"><text:span text:style-name="T23">Uses a </text:span><text:span text:style-name="Strong_20_Emphasis"><text:span text:style-name="T25">Self-Join</text:span></text:span><text:span text:style-name="T23"> on the </text:span><text:span text:style-name="T24">employees</text:span><text:span text:style-name="T23"> table, matching </text:span><text:span text:style-name="T24">reportsTo</text:span><text:span text:style-name="T23"> with </text:span><text:span text:style-name="T24">employeeNumber</text:span><text:span text:style-name="T23"> to show staff/manager pairs.</text:span></text:p>
          </table:table-cell>
          <table:table-cell table:style-name="Table1.E2">
            <text:p text:style-name="P4"><draw:frame draw:style-name="fr1" draw:name="Image28" text:anchor-type="char" svg:width="4.0634in" svg:height="1.2189in" draw:z-index="27"><draw:image xlink:href="Pictures/10000001000003DE0000012945AAC9F4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6">29</text:p>
          </table:table-cell>
          <table:table-cell table:style-name="Table1.B30" office:value-type="string">
            <text:p text:style-name="P1">Get orderdetails with product vendor</text:p>
          </table:table-cell>
          <table:table-cell table:style-name="Table1.C30" office:value-type="string">
            <text:p text:style-name="P4">SELECT od.*, p."productVendor" FROM orderdetails od JOIN products p ON od."productCode" = p."productCode";</text:p>
          </table:table-cell>
          <table:table-cell table:style-name="Table1.D30" office:value-type="string">
            <text:p text:style-name="P8">Joins order line items with the products table to identify the supplier for each item sold.</text:p>
          </table:table-cell>
          <table:table-cell table:style-name="Table1.E2">
            <text:p text:style-name="P4"><draw:frame draw:style-name="fr1" draw:name="Image29" text:anchor-type="char" svg:width="4.0634in" svg:height="1.2189in" draw:z-index="28"><draw:image xlink:href="Pictures/10000001000003DE00000129E7578F7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0</text:p>
          </table:table-cell>
          <table:table-cell table:style-name="Table1.B31" office:value-type="string">
            <text:p text:style-name="P1">Get payments with customer country</text:p>
          </table:table-cell>
          <table:table-cell table:style-name="Table1.C31" office:value-type="string">
            <text:p text:style-name="P4">SELECT p.*, c.country FROM payments p JOIN customers c ON p."customerNumber" = c."customerNumber";</text:p>
          </table:table-cell>
          <table:table-cell table:style-name="Table1.D31" office:value-type="string">
            <text:p text:style-name="P8">Links payments to customers to analyze which countries are generating the most transaction records.</text:p>
          </table:table-cell>
          <table:table-cell table:style-name="Table1.E2">
            <text:p text:style-name="P4"><draw:frame draw:style-name="fr1" draw:name="Image30" text:anchor-type="char" svg:width="4.0634in" svg:height="1.2189in" draw:z-index="29"><draw:image xlink:href="Pictures/10000001000003DE000001293FBCB9F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1</text:p>
          </table:table-cell>
          <table:table-cell table:style-name="Table1.B32" office:value-type="string">
            <text:p text:style-name="P1">Count customers per country</text:p>
          </table:table-cell>
          <table:table-cell table:style-name="Table1.C32" office:value-type="string">
            <text:p text:style-name="P4">SELECT country, COUNT(*) FROM customers GROUP BY country;</text:p>
          </table:table-cell>
          <table:table-cell table:style-name="Table1.D32" office:value-type="string">
            <text:p text:style-name="P4"><text:span text:style-name="T8">Uses </text:span><text:span text:style-name="T9">GROUP BY</text:span><text:span text:style-name="T8"> on the </text:span><text:span text:style-name="T9">country</text:span><text:span text:style-name="T8"> column and </text:span><text:span text:style-name="T9">COUNT(*)</text:span><text:span text:style-name="T8"> to find the total number of clients in each nation.</text:span></text:p>
          </table:table-cell>
          <table:table-cell table:style-name="Table1.E2">
            <text:p text:style-name="P4"><draw:frame draw:style-name="fr1" draw:name="Image31" text:anchor-type="char" svg:width="4.0634in" svg:height="1.2189in" draw:z-index="30"><draw:image xlink:href="Pictures/10000001000003DE000001298E0A52C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2</text:p>
          </table:table-cell>
          <table:table-cell table:style-name="Table1.B33" office:value-type="string">
            <text:p text:style-name="P1">Total payments per customer</text:p>
          </table:table-cell>
          <table:table-cell table:style-name="Table1.C33" office:value-type="string">
            <text:p text:style-name="P4">SELECT "customerNumber", SUM(amount) FROM payments GROUP BY "customerNumber";</text:p>
          </table:table-cell>
          <table:table-cell table:style-name="Table1.D33" office:value-type="string">
            <text:p text:style-name="P4"><text:span text:style-name="T8">Groups transactions by </text:span><text:span text:style-name="T9">customerNumber</text:span><text:span text:style-name="T8"> and uses </text:span><text:span text:style-name="T9">SUM(amount)</text:span><text:span text:style-name="T8"> to calculate the total lifetime value of each client.</text:span></text:p>
          </table:table-cell>
          <table:table-cell table:style-name="Table1.E2">
            <text:p text:style-name="P4"><draw:frame draw:style-name="fr1" draw:name="Image32" text:anchor-type="char" svg:width="4.0634in" svg:height="1.2189in" draw:z-index="31"><draw:image xlink:href="Pictures/10000001000003DE00000129F4CFD8E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6">33</text:p>
          </table:table-cell>
          <table:table-cell table:style-name="Table1.B34" office:value-type="string">
            <text:p text:style-name="P1">Number of orders per status</text:p>
          </table:table-cell>
          <table:table-cell table:style-name="Table1.C34" office:value-type="string">
            <text:p text:style-name="P4">SELECT status, COUNT(*) FROM orders GROUP BY status;</text:p>
          </table:table-cell>
          <table:table-cell table:style-name="Table1.D34" office:value-type="string">
            <text:p text:style-name="P4"><text:span text:style-name="T8">Uses </text:span><text:span text:style-name="T9">GROUP BY status</text:span><text:span text:style-name="T8"> to count how many orders are currently 'Shipped', 'Cancelled', or 'In Process'.</text:span></text:p>
          </table:table-cell>
          <table:table-cell table:style-name="Table1.E2">
            <text:p text:style-name="P4"><draw:frame draw:style-name="fr1" draw:name="Image33" text:anchor-type="char" svg:width="4.0634in" svg:height="1.2189in" draw:z-index="32"><draw:image xlink:href="Pictures/10000001000003DE00000129FB38CE4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4</text:p>
          </table:table-cell>
          <table:table-cell table:style-name="Table1.B35" office:value-type="string">
            <text:p text:style-name="P1">Products per product line</text:p>
          </table:table-cell>
          <table:table-cell table:style-name="Table1.C35" office:value-type="string">
            <text:p text:style-name="P4">SELECT "productLine", COUNT(*) FROM products GROUP BY "productLine";</text:p>
          </table:table-cell>
          <table:table-cell table:style-name="Table1.D35" office:value-type="string">
            <text:p text:style-name="P8">Groups the inventory by category and counts the number of distinct items in each line.</text:p>
          </table:table-cell>
          <table:table-cell table:style-name="Table1.E2">
            <text:p text:style-name="P4"><draw:frame draw:style-name="fr1" draw:name="Image34" text:anchor-type="char" svg:width="4.0634in" svg:height="1.2189in" draw:z-index="33"><draw:image xlink:href="Pictures/10000001000003DE000001291952E74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5</text:p>
          </table:table-cell>
          <table:table-cell table:style-name="Table1.B36" office:value-type="string">
            <text:p text:style-name="P1">Employees per office</text:p>
          </table:table-cell>
          <table:table-cell table:style-name="Table1.C36" office:value-type="string">
            <text:p text:style-name="P4">SELECT "officeCode", COUNT(*) FROM employees GROUP BY "officeCode";</text:p>
          </table:table-cell>
          <table:table-cell table:style-name="Table1.D36" office:value-type="string">
            <text:p text:style-name="P4"><text:span text:style-name="T8">Groups staff by their </text:span><text:span text:style-name="T9">officeCode</text:span><text:span text:style-name="T8"> to see the headcount for each physical location.</text:span></text:p>
          </table:table-cell>
          <table:table-cell table:style-name="Table1.E2">
            <text:p text:style-name="P4"><draw:frame draw:style-name="fr1" draw:name="Image35" text:anchor-type="char" svg:width="4.0634in" svg:height="1.2189in" draw:z-index="34"><draw:image xlink:href="Pictures/10000001000003DE00000129BE6A822E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6</text:p>
          </table:table-cell>
          <table:table-cell table:style-name="Table1.B37" office:value-type="string">
            <text:p text:style-name="P1">Total stock per product vendor</text:p>
          </table:table-cell>
          <table:table-cell table:style-name="Table1.C37" office:value-type="string">
            <text:p text:style-name="P4">SELECT "productVendor", SUM("quantityInStock") FROM products GROUP BY "productVendor";</text:p>
          </table:table-cell>
          <table:table-cell table:style-name="Table1.D37" office:value-type="string">
            <text:p text:style-name="P4"><text:span text:style-name="T8">Groups by </text:span><text:span text:style-name="T9">productVendor</text:span><text:span text:style-name="T8"> and uses </text:span><text:span text:style-name="T9">SUM(quantityInStock)</text:span><text:span text:style-name="T8"> to see which supplier has the most volume.</text:span></text:p>
          </table:table-cell>
          <table:table-cell table:style-name="Table1.E2">
            <text:p text:style-name="P4"><draw:frame draw:style-name="fr1" draw:name="Image36" text:anchor-type="char" svg:width="4.0634in" svg:height="1.2189in" draw:z-index="35"><draw:image xlink:href="Pictures/10000001000003DE000001291617D09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6">37</text:p>
          </table:table-cell>
          <table:table-cell table:style-name="Table1.B38" office:value-type="string">
            <text:p text:style-name="P1">Average buy price per product line</text:p>
          </table:table-cell>
          <table:table-cell table:style-name="Table1.C38" office:value-type="string">
            <text:p text:style-name="P4">SELECT "productLine", AVG("buyPrice") FROM products GROUP BY "productLine";</text:p>
          </table:table-cell>
          <table:table-cell table:style-name="Table1.D38" office:value-type="string">
            <text:p text:style-name="P4"><text:span text:style-name="T8">Calculates the </text:span><text:span text:style-name="T9">AVG</text:span><text:span text:style-name="T8"> price of items grouped by their category to see which lines are most expensive to source.</text:span></text:p>
          </table:table-cell>
          <table:table-cell table:style-name="Table1.E2">
            <text:p text:style-name="P4"><draw:frame draw:style-name="fr1" draw:name="Image37" text:anchor-type="char" svg:width="4.0634in" svg:height="1.2189in" draw:z-index="36"><draw:image xlink:href="Pictures/10000001000003DE0000012966C2EDB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8</text:p>
          </table:table-cell>
          <table:table-cell table:style-name="Table1.B39" office:value-type="string">
            <text:p text:style-name="P1">Orders per customer</text:p>
          </table:table-cell>
          <table:table-cell table:style-name="Table1.C39" office:value-type="string">
            <text:p text:style-name="P4">SELECT "customerNumber", COUNT(*) FROM orders GROUP BY "customerNumber";</text:p>
          </table:table-cell>
          <table:table-cell table:style-name="Table1.D39" office:value-type="string">
            <text:p text:style-name="P4"><text:span text:style-name="T8">Groups by </text:span><text:span text:style-name="T9">customerNumber</text:span><text:span text:style-name="T8"> and counts entries in the orders table to identify the most frequent buyers.</text:span></text:p>
          </table:table-cell>
          <table:table-cell table:style-name="Table1.E2">
            <text:p text:style-name="P4"><draw:frame draw:style-name="fr1" draw:name="Image38" text:anchor-type="char" svg:width="4.0634in" svg:height="1.2189in" draw:z-index="37"><draw:image xlink:href="Pictures/10000001000003DE00000129C6D4F1D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39</text:p>
          </table:table-cell>
          <table:table-cell table:style-name="Table1.B40" office:value-type="string">
            <text:p text:style-name="P1">Max MSRP per product line</text:p>
          </table:table-cell>
          <table:table-cell table:style-name="Table1.C40" office:value-type="string">
            <text:p text:style-name="P4">SELECT "productLine", MAX("MSRP") FROM products GROUP BY "productLine";</text:p>
          </table:table-cell>
          <table:table-cell table:style-name="Table1.D40" office:value-type="string">
            <text:p text:style-name="P4"><text:span text:style-name="T8">Finds the highest suggested retail price within each product category using the </text:span><text:span text:style-name="T9">MAX</text:span><text:span text:style-name="T8"> function.</text:span></text:p>
          </table:table-cell>
          <table:table-cell table:style-name="Table1.E2">
            <text:p text:style-name="P4"><draw:frame draw:style-name="fr1" draw:name="Image39" text:anchor-type="char" svg:width="4.0634in" svg:height="1.2189in" draw:z-index="38"><draw:image xlink:href="Pictures/10000001000003DE00000129687A3AD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40</text:p>
          </table:table-cell>
          <table:table-cell table:style-name="Table1.B41" office:value-type="string">
            <text:p text:style-name="P1">Min buy price per vendor</text:p>
          </table:table-cell>
          <table:table-cell table:style-name="Table1.C41" office:value-type="string">
            <text:p text:style-name="P4">SELECT "productVendor", MIN("buyPrice") FROM products GROUP BY "productVendor";</text:p>
          </table:table-cell>
          <table:table-cell table:style-name="Table1.D41" office:value-type="string">
            <text:p text:style-name="P4"><text:span text:style-name="T8">Uses the </text:span><text:span text:style-name="T9">MIN</text:span><text:span text:style-name="T8"> function grouped by vendor to find the cheapest item supplied by each vendor.</text:span></text:p>
          </table:table-cell>
          <table:table-cell table:style-name="Table1.E2">
            <text:p text:style-name="P4"><draw:frame draw:style-name="fr1" draw:name="Image40" text:anchor-type="char" svg:width="4.0634in" svg:height="1.2189in" draw:z-index="39"><draw:image xlink:href="Pictures/10000001000003DE00000129CB978460.png" xlink:type="simple" xlink:show="embed" xlink:actuate="onLoad" draw:mime-type="image/png"/></draw:frame></text:p>
          </table:table-cell>
        </table:table-row>
        <text:soft-page-break/>
        <table:table-row table:style-name="Table1.42">
          <table:table-cell table:style-name="Table1.A2" office:value-type="string">
            <text:p text:style-name="P6">41</text:p>
          </table:table-cell>
          <table:table-cell table:style-name="Table1.B42" office:value-type="string">
            <text:p text:style-name="P1">Total number of customers</text:p>
          </table:table-cell>
          <table:table-cell table:style-name="Table1.C42" office:value-type="string">
            <text:p text:style-name="P4">SELECT COUNT(*) FROM customers;</text:p>
          </table:table-cell>
          <table:table-cell table:style-name="Table1.D42" office:value-type="string">
            <text:p text:style-name="P4"><text:span text:style-name="T8">Uses the </text:span><text:span text:style-name="T9">COUNT</text:span><text:span text:style-name="T8"> function on the entire </text:span><text:span text:style-name="T9">customers</text:span><text:span text:style-name="T8"> table to get a grand total of the client base.</text:span></text:p>
          </table:table-cell>
          <table:table-cell table:style-name="Table1.E2">
            <text:p text:style-name="P4"><draw:frame draw:style-name="fr1" draw:name="Image41" text:anchor-type="char" svg:width="4.0634in" svg:height="1.2189in" draw:z-index="40"><draw:image xlink:href="Pictures/100000010000016700000094C63B9EB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42</text:p>
          </table:table-cell>
          <table:table-cell table:style-name="Table1.B43" office:value-type="string">
            <text:p text:style-name="P1">Total number of products</text:p>
          </table:table-cell>
          <table:table-cell table:style-name="Table1.C43" office:value-type="string">
            <text:p text:style-name="P4">SELECT COUNT(*) FROM products;</text:p>
          </table:table-cell>
          <table:table-cell table:style-name="Table1.D43" office:value-type="string">
            <text:p text:style-name="P4"><text:span text:style-name="T8">Performs a count of all records in the </text:span><text:span text:style-name="T9">products</text:span><text:span text:style-name="T8"> table to find the size of the total catalog.</text:span></text:p>
          </table:table-cell>
          <table:table-cell table:style-name="Table1.E2">
            <text:p text:style-name="P4"><draw:frame draw:style-name="fr1" draw:name="Image42" text:anchor-type="char" svg:width="4.0634in" svg:height="1.2189in" draw:z-index="41"><draw:image xlink:href="Pictures/1000000100000167000000947B359BB9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43</text:p>
          </table:table-cell>
          <table:table-cell table:style-name="Table1.B44" office:value-type="string">
            <text:p text:style-name="P1">Total revenue from payments</text:p>
          </table:table-cell>
          <table:table-cell table:style-name="Table1.C44" office:value-type="string">
            <text:p text:style-name="P4">SELECT SUM(amount) FROM payments;</text:p>
          </table:table-cell>
          <table:table-cell table:style-name="Table1.D44" office:value-type="string">
            <text:p text:style-name="P4"><text:span text:style-name="T8">Applies the </text:span><text:span text:style-name="T9">SUM</text:span><text:span text:style-name="T8"> function to the </text:span><text:span text:style-name="T9">amount</text:span><text:span text:style-name="T8"> column in </text:span><text:span text:style-name="T9">payments</text:span><text:span text:style-name="T8"> to calculate the company's total gross income.</text:span></text:p>
          </table:table-cell>
          <table:table-cell table:style-name="Table1.E2">
            <text:p text:style-name="P4"><draw:frame draw:style-name="fr1" draw:name="Image43" text:anchor-type="char" svg:width="4.0634in" svg:height="1.2189in" draw:z-index="42"><draw:image xlink:href="Pictures/100000010000016700000094D3E69AF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44</text:p>
          </table:table-cell>
          <table:table-cell table:style-name="Table1.B45" office:value-type="string">
            <text:p text:style-name="P1">Average product price</text:p>
          </table:table-cell>
          <table:table-cell table:style-name="Table1.C45" office:value-type="string">
            <text:p text:style-name="P4">SELECT AVG("buyPrice") FROM products;</text:p>
          </table:table-cell>
          <table:table-cell table:style-name="Table1.D45" office:value-type="string">
            <text:p text:style-name="P4"><text:span text:style-name="T8">Calculates the mean value of the </text:span><text:span text:style-name="T9">buyPrice</text:span><text:span text:style-name="T8"> column across the entire product catalog.</text:span></text:p>
          </table:table-cell>
          <table:table-cell table:style-name="Table1.E2">
            <text:p text:style-name="P4"><draw:frame draw:style-name="fr1" draw:name="Image44" text:anchor-type="char" svg:width="4.0634in" svg:height="1.2189in" draw:z-index="43"><draw:image xlink:href="Pictures/10000001000001670000009487D2ECC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45</text:p>
          </table:table-cell>
          <table:table-cell table:style-name="Table1.B46" office:value-type="string">
            <text:p text:style-name="P1">Max payment amount</text:p>
          </table:table-cell>
          <table:table-cell table:style-name="Table1.C46" office:value-type="string">
            <text:p text:style-name="P4">SELECT MAX(amount) FROM payments;</text:p>
          </table:table-cell>
          <table:table-cell table:style-name="Table1.D46" office:value-type="string">
            <text:p text:style-name="P4"><text:span text:style-name="T8">Uses the </text:span><text:span text:style-name="T9">MAX</text:span><text:span text:style-name="T8"> function on the </text:span><text:span text:style-name="T9">payments</text:span><text:span text:style-name="T8"> table to identify the largest single transaction ever made.</text:span></text:p>
          </table:table-cell>
          <table:table-cell table:style-name="Table1.E2">
            <text:p text:style-name="P4"><draw:frame draw:style-name="fr1" draw:name="Image45" text:anchor-type="char" svg:width="4.0634in" svg:height="1.2189in" draw:z-index="44"><draw:image xlink:href="Pictures/100000010000016700000094B00E7983.png" xlink:type="simple" xlink:show="embed" xlink:actuate="onLoad" draw:mime-type="image/png"/></draw:frame><text:soft-page-break/></text:p>
          </table:table-cell>
        </table:table-row>
        <table:table-row>
          <table:table-cell table:style-name="Table1.A2" office:value-type="string">
            <text:p text:style-name="P6">46</text:p>
          </table:table-cell>
          <table:table-cell table:style-name="Table1.B47" office:value-type="string">
            <text:p text:style-name="P1">Min payment amount</text:p>
          </table:table-cell>
          <table:table-cell table:style-name="Table1.C47" office:value-type="string">
            <text:p text:style-name="P4">SELECT MIN(amount) FROM payments;</text:p>
          </table:table-cell>
          <table:table-cell table:style-name="Table1.D47" office:value-type="string">
            <text:p text:style-name="P4"><text:span text:style-name="T8">Uses the </text:span><text:span text:style-name="T9">MIN</text:span><text:span text:style-name="T8"> function to find the smallest transaction record in the database.</text:span></text:p>
          </table:table-cell>
          <table:table-cell table:style-name="Table1.E2">
            <text:p text:style-name="P4"><draw:frame draw:style-name="fr1" draw:name="Image46" text:anchor-type="char" svg:width="4.0634in" svg:height="1.2189in" draw:z-index="45"><draw:image xlink:href="Pictures/100000010000016700000094CA9F987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47</text:p>
          </table:table-cell>
          <table:table-cell table:style-name="Table1.B48" office:value-type="string">
            <text:p text:style-name="P1">Count total orders</text:p>
          </table:table-cell>
          <table:table-cell table:style-name="Table1.C48" office:value-type="string">
            <text:p text:style-name="P4">SELECT COUNT(*) FROM orders;</text:p>
          </table:table-cell>
          <table:table-cell table:style-name="Table1.D48" office:value-type="string">
            <text:p text:style-name="P4"><text:span text:style-name="T8">Returns the total count of all rows in the </text:span><text:span text:style-name="T9">orders</text:span><text:span text:style-name="T8"> table to measure total sales volume.</text:span></text:p>
          </table:table-cell>
          <table:table-cell table:style-name="Table1.E2">
            <text:p text:style-name="P4"><draw:frame draw:style-name="fr1" draw:name="Image47" text:anchor-type="char" svg:width="4.0634in" svg:height="1.2189in" draw:z-index="46"><draw:image xlink:href="Pictures/100000010000016700000094B36D017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48</text:p>
          </table:table-cell>
          <table:table-cell table:style-name="Table1.B49" office:value-type="string">
            <text:p text:style-name="P1">Total quantity in stock</text:p>
          </table:table-cell>
          <table:table-cell table:style-name="Table1.C49" office:value-type="string">
            <text:p text:style-name="P4">SELECT SUM("quantityInStock") FROM products;</text:p>
          </table:table-cell>
          <table:table-cell table:style-name="Table1.D49" office:value-type="string">
            <text:p text:style-name="P4"><text:span text:style-name="T8">Sums the </text:span><text:span text:style-name="T9">quantityInStock</text:span><text:span text:style-name="T8"> column across all products to find the total units available in the warehouse.</text:span></text:p>
          </table:table-cell>
          <table:table-cell table:style-name="Table1.E2">
            <text:p text:style-name="P4"><draw:frame draw:style-name="fr1" draw:name="Image48" text:anchor-type="char" svg:width="4.0634in" svg:height="1.2189in" draw:z-index="47"><draw:image xlink:href="Pictures/1000000100000167000000948A6D9AB7.png" xlink:type="simple" xlink:show="embed" xlink:actuate="onLoad" draw:mime-type="image/png"/></draw:frame></text:p>
          </table:table-cell>
        </table:table-row>
        <table:table-row table:style-name="Table1.50">
          <table:table-cell table:style-name="Table1.A2" office:value-type="string">
            <text:p text:style-name="P6">49</text:p>
          </table:table-cell>
          <table:table-cell table:style-name="Table1.B50" office:value-type="string">
            <text:p text:style-name="P1">Average MSRP</text:p>
          </table:table-cell>
          <table:table-cell table:style-name="Table1.C50" office:value-type="string">
            <text:p text:style-name="P4">SELECT AVG("MSRP") FROM products;</text:p>
          </table:table-cell>
          <table:table-cell table:style-name="Table1.D50" office:value-type="string">
            <text:p text:style-name="P8">Calculates the average Manufacturer's Suggested Retail Price across all products in the database.</text:p>
          </table:table-cell>
          <table:table-cell table:style-name="Table1.E2">
            <text:p text:style-name="P4"><draw:frame draw:style-name="fr1" draw:name="Image50 Copy 1" text:anchor-type="char" svg:width="4.0634in" svg:height="1.2189in" draw:z-index="49"><draw:image xlink:href="Pictures/100000010000016700000094F0187698.png" xlink:type="simple" xlink:show="embed" xlink:actuate="onLoad" draw:mime-type="image/png"/></draw:frame><text:soft-page-break/></text:p>
          </table:table-cell>
        </table:table-row>
        <table:table-row>
          <table:table-cell table:style-name="Table1.A51" office:value-type="string">
            <text:p text:style-name="P6">50</text:p>
          </table:table-cell>
          <table:table-cell table:style-name="Table1.B51" office:value-type="string">
            <text:p text:style-name="P1">Number of employees</text:p>
          </table:table-cell>
          <table:table-cell table:style-name="Table1.C51" office:value-type="string">
            <text:p text:style-name="P4">SELECT COUNT(*) FROM employees;</text:p>
          </table:table-cell>
          <table:table-cell table:style-name="Table1.D51" office:value-type="string">
            <text:p text:style-name="P4"><text:span text:style-name="T8">Uses </text:span><text:span text:style-name="T9">COUNT(*)</text:span><text:span text:style-name="T8"> on the </text:span><text:span text:style-name="T9">employees</text:span><text:span text:style-name="T8"> table to determine the total size of the workforce.</text:span></text:p>
          </table:table-cell>
          <table:table-cell table:style-name="Table1.E51">
            <text:p text:style-name="P4"><draw:frame draw:style-name="fr1" draw:name="Image50" text:anchor-type="char" svg:width="4.0634in" svg:height="1.2189in" draw:z-index="48"><draw:image xlink:href="Pictures/1000000100000167000000941DFAE37E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DM Mono" svg:font-family="'DM Mono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7:19:46.783108605</meta:creation-date>
    <dc:date>2026-05-20T13:29:58.827189152</dc:date>
    <meta:editing-duration>PT13H54M44S</meta:editing-duration>
    <meta:editing-cycles>2</meta:editing-cycles>
    <meta:generator>LibreOffice/24.2.7.2$Linux_X86_64 LibreOffice_project/420$Build-2</meta:generator>
    <meta:document-statistic meta:table-count="1" meta:image-count="50" meta:object-count="0" meta:page-count="13" meta:paragraph-count="205" meta:word-count="1338" meta:character-count="8832" meta:non-whitespace-character-count="7699"/>
  </office:meta>
</office:document-meta>
</file>